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🛠️ Herramientas y No-Code (Ahorro de tiempo)</text:h>
      <text:list text:style-name="L1">
        <text:list-item>
          <text:p text:style-name="P1"><text:span text:style-name="T1">El "Stack" gratuito de 2026:</text:span> Cómo montar toda la infraestructura de tu proyecto web sin gastar un euro hasta tener clientes.</text:p>
        </text:list-item>
        <text:list-item>
          <text:p text:style-name="P1"><text:span text:style-name="T1">Cursor vs. Windsurf:</text:span> Mi experiencia probando los dos editores de IA que están jubilando a los programadores tradicionales.</text:p>
        </text:list-item>
        <text:list-item>
          <text:p text:style-name="P1"><text:span text:style-name="T1">Diseño web instantáneo:</text:span> Cómo usé v0.dev para crear la interfaz de esta misma web sin saber apenas CSS.</text:p>
        </text:list-item>
        <text:list-item>
          <text:p text:style-name="P1"><text:span text:style-name="T1">Bases de datos para mortales:</text:span> Cómo conectar tu proyecto No-Code sin morir de frustración en el intento.</text:p>
        </text:list-item>
      </text:list>
      <text:h text:style-name="Heading_20_3" text:outline-level="3">💼 Emprendimiento y Micro-SaaS (Para el Fundador Solitario)</text:h>
      <text:list text:style-name="L2">
        <text:list-item>
          <text:p text:style-name="P2"><text:span text:style-name="T1">Por qué tu primer SaaS debe ser "aburrido":</text:span> El peligro de querer crear el próximo Google frente a resolver un problema en Excel de una clínica dental.</text:p>
        </text:list-item>
        <text:list-item>
          <text:p text:style-name="P2"><text:span text:style-name="T1">Marketing para introvertidos:</text:span> Cómo usar agentes autónomos para buscar clientes y mandar emails mientras tú duermes.</text:p>
        </text:list-item>
        <text:list-item>
          <text:p text:style-name="P2"><text:span text:style-name="T1">El fin de las suscripciones abusivas:</text:span> Modelos de pago único (Lifetime Deals) que están arrasando y cómo aplicarlos a tu idea.</text:p>
        </text:list-item>
        <text:list-item>
          <text:p text:style-name="P2"><text:span text:style-name="T1">Mi mayor fracaso confiando en la IA:</text:span> Lo que pasó cuando dejé que un modelo generara código sin revisarlo a fondo.</text:p>
        </text:list-item>
      </text:list>
      <text:h text:style-name="Heading_20_3" text:outline-level="3">🤖 Productividad y Automatización Real</text:h>
      <text:list text:style-name="L3">
        <text:list-item>
          <text:p text:style-name="P3"><text:span text:style-name="T1">Despide a tu yo del pasado:</text:span> 5 flujos de trabajo diarios que deberías haber automatizado ayer.</text:p>
        </text:list-item>
        <text:list-item>
          <text:p text:style-name="P3"><text:span text:style-name="T1">El clon digital:</text:span> Cómo configuré un asistente para que clasifique y responda el 80% de mi correo basura.</text:p>
        </text:list-item>
        <text:list-item>
          <text:p text:style-name="P3"><text:span text:style-name="T1">IA para tus finanzas:</text:span> El prompt exacto que utilizo cada mes para que la IA audite mis gastos y me diga dónde recortar.</text:p>
        </text:list-item>
        <text:list-item>
          <text:p text:style-name="P3"><text:span text:style-name="T1">La paradoja de la IA:</text:span> Automatizamos todo, pero trabajamos más horas. Cómo evitar el <text:span text:style-name="T2">burnout</text:span> digital en 2026.</text:p>
        </text:list-item>
      </text:list>
      <text:h text:style-name="Heading_20_3" text:outline-level="3">🔒 Soberanía de Datos y Ética (Para generar confianza)</text:h>
      <text:list text:style-name="L4">
        <text:list-item>
          <text:p text:style-name="P4"><text:span text:style-name="T1">El contraataque del Open Source:</text:span> Por qué las empresas están huyendo de las nubes cerradas y volviendo al software libre.</text:p>
        </text:list-item>
        <text:list-item>
          <text:p text:style-name="P4"><text:span text:style-name="T1">IA Local en tu ordenador:</text:span> Cómo instalar modelos potentes en tu PC para que nadie espíe tus documentos confidenciales.</text:p>
        </text:list-item>
        <text:list-item>
          <text:p text:style-name="P4"><text:span text:style-name="T1">Vender confianza en 2026:</text:span> Por qué alojar tu proyecto en España (y usar un dominio .es) es ahora tu mejor arma de marketing.</text:p>
        </text:list-item>
        <text:list-item>
          <text:p text:style-name="P4"><text:span text:style-name="T1">La burbuja de la IA:</text:span> Qué herramientas desaparecerán este año y cuáles llegaron para quedarse.</text:p>
        </text:list-item>
      </text:list>
      <text:h text:style-name="Heading_20_3" text:outline-level="3"><text:soft-page-break/>🎓 Aprendizaje y Futuro (Desde tu perspectiva de estudiante)</text:h>
      <text:list text:style-name="L5">
        <text:list-item>
          <text:p text:style-name="P5"><text:span text:style-name="T1">Diario de un estudiante de IA:</text:span> Lo que la universidad no te cuenta sobre cómo funciona realmente el mercado laboral hoy.</text:p>
        </text:list-item>
        <text:list-item>
          <text:p text:style-name="P5"><text:span text:style-name="T1">Las 3 habilidades "humanas":</text:span> Qué capacidades debes entrenar hoy porque ningún agente de IA podrá reemplazarlas en esta década.</text:p>
        </text:list-item>
        <text:list-item>
          <text:p text:style-name="P5"><text:span text:style-name="T1">De consumidor a creador:</text:span> Una hoja de ruta realista de 30 días para entender la tecnología que usas a diario.</text:p>
        </text:list-item>
        <text:list-item>
          <text:p text:style-name="P5"><text:span text:style-name="T1">¿Seguirán existiendo las apps en 2030?</text:span> Mi análisis sobre la transición de las pantallas a las interfaces controladas 100% por voz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00:25:46.802740500</meta:creation-date>
    <dc:date>2026-05-07T00:26:14.721495300</dc:date>
    <meta:editing-duration>PT28S</meta:editing-duration>
    <meta:editing-cycles>1</meta:editing-cycles>
    <meta:document-statistic meta:table-count="0" meta:image-count="0" meta:object-count="0" meta:page-count="2" meta:paragraph-count="25" meta:word-count="450" meta:character-count="2613" meta:non-whitespace-character-count="2208"/>
    <meta:generator>LibreOffice/25.8.5.2$Windows_X86_64 LibreOffice_project/9c8b85f387cc00a89945a79c9e6239f32e450ac2</meta:generator>
  </office:meta>
</office:document-meta>
</file>